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language="en" fo:country="NL"/>
    </style:style>
    <style:style style:name="T3" style:parent-style-name="DefaultParagraphFont" style:family="text">
      <style:text-properties fo:language="en" fo:country="NL"/>
    </style:style>
    <style:style style:name="T4" style:parent-style-name="DefaultParagraphFont" style:family="text">
      <style:text-properties fo:font-weight="bold" style:font-weight-asian="bold" style:font-weight-complex="bold" fo:language="en" fo:country="NL"/>
    </style:style>
    <style:style style:name="T5" style:parent-style-name="DefaultParagraphFont" style:family="text">
      <style:text-properties fo:language="en" fo:country="NL"/>
    </style:style>
    <style:style style:name="T6" style:parent-style-name="DefaultParagraphFont" style:family="text">
      <style:text-properties fo:font-weight="bold" style:font-weight-asian="bold" style:font-weight-complex="bold" fo:language="en" fo:country="NL"/>
    </style:style>
    <style:style style:name="T7" style:parent-style-name="DefaultParagraphFont" style:family="text">
      <style:text-properties fo:language="en" fo:country="NL"/>
    </style:style>
    <style:style style:name="T8" style:parent-style-name="DefaultParagraphFont" style:family="text">
      <style:text-properties fo:font-weight="bold" style:font-weight-asian="bold" style:font-weight-complex="bold" fo:language="en" fo:country="NL"/>
    </style:style>
    <style:style style:name="T9" style:parent-style-name="DefaultParagraphFont" style:family="text">
      <style:text-properties fo:language="en" fo:country="NL"/>
    </style:style>
    <style:style style:name="T10" style:parent-style-name="DefaultParagraphFont" style:family="text">
      <style:text-properties fo:font-weight="bold" style:font-weight-asian="bold" style:font-weight-complex="bold" fo:language="en" fo:country="NL"/>
    </style:style>
    <style:style style:name="T11" style:parent-style-name="DefaultParagraphFont" style:family="text">
      <style:text-properties fo:language="en" fo:country="NL"/>
    </style:style>
    <style:style style:name="T12" style:parent-style-name="DefaultParagraphFont" style:family="text">
      <style:text-properties fo:font-weight="bold" style:font-weight-asian="bold" style:font-weight-complex="bold" fo:language="en" fo:country="NL"/>
    </style:style>
    <style:style style:name="T13" style:parent-style-name="DefaultParagraphFont" style:family="text">
      <style:text-properties fo:language="en" fo:country="NL"/>
    </style:style>
    <style:style style:name="P14" style:parent-style-name="Normal" style:family="paragraph">
      <style:text-properties fo:language="en" fo:country="NL"/>
    </style:style>
  </office:automatic-styles>
  <office:body>
    <office:text text:use-soft-page-breaks="true">
      <text:p text:style-name="P1"><text:span text:style-name="T2">JavaScript:</text:span><text:span text:style-name="T3"><text:s/>Hovenierswebsite gemaakt (afgerond volgens de gestelde eisen).</text:span></text:p>
      <text:p text:style-name="Normal"><text:span text:style-name="T4">PHP:</text:span><text:span text:style-name="T5"><text:s/>Eigen opdracht (al vooruit gewerkt).</text:span></text:p>
      <text:p text:style-name="Normal"><text:span text:style-name="T6">Ontwerp:</text:span><text:span text:style-name="T7"><text:s/>Datasysteem voor een luchtvaartmaatschappij (afgerond).</text:span></text:p>
      <text:p text:style-name="Normal"><text:span text:style-name="T8">Nederlands:</text:span><text:span text:style-name="T9"><text:s/>Opdrachten uit Malmberg (afgerond).</text:span></text:p>
      <text:p text:style-name="Normal"><text:span text:style-name="T10">Engels:</text:span><text:span text:style-name="T11"><text:s/>Twee opdrachten ontvangen en afgerond.</text:span></text:p>
      <text:p text:style-name="Normal"><text:span text:style-name="T12">Rekenen:</text:span><text:span text:style-name="T13"><text:s/>Opdrachten uit Malmberg (gemaakt).</text:span></text:p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nl" fo:country="NL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 fo:language="nl" fo:country="NL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 fo:language="nl" fo:country="NL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 fo:language="nl" fo:country="NL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 fo:language="nl" fo:country="NL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 fo:language="nl" fo:country="NL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 fo:language="nl" fo:country="NL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 fo:language="nl" fo:country="NL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 fo:language="nl" fo:country="NL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 fo:language="nl" fo:country="NL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nl" fo:country="NL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 fo:language="nl" fo:country="NL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 fo:language="nl" fo:country="NL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 fo:language="nl" fo:country="NL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lorian Groot</meta:initial-creator>
    <dc:creator>Florian Groot</dc:creator>
    <meta:creation-date>2026-02-23T08:13:00Z</meta:creation-date>
    <dc:date>2026-02-23T09:24:00Z</dc:date>
    <meta:template xlink:href="Normal" xlink:type="simple"/>
    <meta:editing-cycles>1</meta:editing-cycles>
    <meta:editing-duration>PT4260S</meta:editing-duration>
    <meta:document-statistic meta:page-count="1" meta:paragraph-count="1" meta:word-count="48" meta:character-count="321" meta:row-count="2" meta:non-whitespace-character-count="274"/>
  </office:meta>
</office:document-meta>
</file>